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d6d7" officeooo:paragraph-rsid="0009d6d7"/>
    </style:style>
    <style:style style:name="P2" style:family="paragraph" style:parent-style-name="Horizontal_20_Line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able_20_Heading">
      <style:paragraph-properties fo:text-align="left" style:justify-single-word="false"/>
    </style:style>
    <style:style style:name="P6" style:family="paragraph" style:parent-style-name="Table_20_Contents">
      <style:text-properties style:font-name="Liberation Mono"/>
    </style:style>
    <style:style style:name="P7" style:family="paragraph" style:parent-style-name="Table_20_Contents">
      <style:paragraph-properties fo:text-align="left" style:justify-single-word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Heading_20_3">
      <style:text-properties officeooo:rsid="000bd442" officeooo:paragraph-rsid="000bd442"/>
    </style:style>
    <style:style style:name="P15" style:family="paragraph" style:parent-style-name="Text_20_body">
      <style:text-properties fo:font-weight="bold" officeooo:rsid="000cbf63" officeooo:paragraph-rsid="000cbf63" style:font-weight-asian="bold" style:font-weight-complex="bold"/>
    </style:style>
    <style:style style:name="P16" style:family="paragraph" style:parent-style-name="Text_20_body">
      <style:text-properties fo:font-weight="normal" officeooo:rsid="000cbf63" officeooo:paragraph-rsid="000cbf63" style:font-weight-asian="normal" style:font-weight-complex="normal"/>
    </style:style>
    <style:style style:name="P17" style:family="paragraph" style:parent-style-name="Text_20_body">
      <style:text-properties officeooo:rsid="000cbf63" officeooo:paragraph-rsid="000cbf63"/>
    </style:style>
    <style:style style:name="P18" style:family="paragraph" style:parent-style-name="Text_20_body">
      <style:text-properties fo:font-weight="bold" officeooo:rsid="000cbf63" officeooo:paragraph-rsid="000e8804" style:font-weight-asian="bold" style:font-weight-complex="bold"/>
    </style:style>
    <style:style style:name="P19" style:family="paragraph" style:parent-style-name="Text_20_body">
      <style:paragraph-properties style:writing-mode="lr-tb" style:writing-mode-automatic="false"/>
      <style:text-properties style:text-underline-style="solid" style:text-underline-width="auto" style:text-underline-color="font-color" fo:font-weight="normal" officeooo:rsid="0015f8db" officeooo:paragraph-rsid="0015f8db" style:font-weight-asian="normal" style:font-weight-complex="normal"/>
    </style:style>
    <style:style style:name="P20" style:family="paragraph" style:parent-style-name="Text_20_body">
      <style:paragraph-properties style:writing-mode="lr-tb" style:writing-mode-automatic="false"/>
      <style:text-properties fo:font-weight="normal" officeooo:rsid="00108043" officeooo:paragraph-rsid="00108043" style:font-weight-asian="normal" style:font-weight-complex="normal"/>
    </style:style>
    <style:style style:name="P21" style:family="paragraph" style:parent-style-name="Text_20_body">
      <style:paragraph-properties style:writing-mode="lr-tb" style:writing-mode-automatic="false"/>
      <style:text-properties fo:font-weight="normal" officeooo:rsid="00108afa" officeooo:paragraph-rsid="00108afa" style:font-weight-asian="normal" style:font-weight-complex="normal"/>
    </style:style>
    <style:style style:name="P22" style:family="paragraph" style:parent-style-name="Text_20_body">
      <style:paragraph-properties style:writing-mode="lr-tb" style:writing-mode-automatic="false"/>
      <style:text-properties fo:font-style="normal" style:text-underline-style="solid" style:text-underline-width="auto" style:text-underline-color="font-color" fo:font-weight="normal" officeooo:rsid="001802f0" officeooo:paragraph-rsid="001802f0" style:font-style-asian="normal" style:font-weight-asian="normal" style:font-style-complex="normal" style:font-weight-complex="normal"/>
    </style:style>
    <style:style style:name="P23" style:family="paragraph" style:parent-style-name="Text_20_body" style:list-style-name="L9">
      <style:paragraph-properties style:writing-mode="lr-tb" style:writing-mode-automatic="false"/>
      <style:text-properties fo:font-style="normal" style:text-underline-style="none" fo:font-weight="normal" officeooo:rsid="001802f0" officeooo:paragraph-rsid="001802f0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weight="bold" officeooo:rsid="000cbf63" officeooo:paragraph-rsid="001b6342" style:font-weight-asian="bold" style:font-weight-complex="bold"/>
    </style:style>
    <style:style style:name="P25" style:family="paragraph" style:parent-style-name="Text_20_body">
      <style:paragraph-properties style:writing-mode="lr-tb" style:writing-mode-automatic="false"/>
      <style:text-properties fo:font-style="normal" style:text-underline-style="none" fo:font-weight="normal" officeooo:rsid="001d174c" officeooo:paragraph-rsid="001d174c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style:writing-mode="lr-tb" style:writing-mode-automatic="false"/>
      <style:text-properties fo:font-style="normal" style:text-underline-style="none" fo:font-weight="normal" officeooo:rsid="00267979" officeooo:paragraph-rsid="00267979" style:font-style-asian="normal" style:font-weight-asian="normal" style:font-style-complex="normal" style:font-weight-complex="normal"/>
    </style:style>
    <style:style style:name="T1" style:family="text">
      <style:text-properties officeooo:rsid="000906d3"/>
    </style:style>
    <style:style style:name="T2" style:family="text">
      <style:text-properties fo:font-weight="bold"/>
    </style:style>
    <style:style style:name="T3" style:family="text">
      <style:text-properties officeooo:rsid="0009d6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weight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529b9"/>
    </style:style>
    <style:style style:name="T12" style:family="text">
      <style:text-properties officeooo:rsid="000e8804"/>
    </style:style>
    <style:style style:name="T13" style:family="text">
      <style:text-properties fo:font-style="normal" officeooo:rsid="00108afa" style:font-style-asian="normal" style:font-style-complex="normal"/>
    </style:style>
    <style:style style:name="T14" style:family="text">
      <style:text-properties officeooo:rsid="0019db6c"/>
    </style:style>
    <style:style style:name="T15" style:family="text">
      <style:text-properties officeooo:rsid="001b6342"/>
    </style:style>
    <style:style style:name="T16" style:family="text">
      <style:text-properties officeooo:rsid="0026ab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ação Explicativa</text:h>
      <text:p text:style-name="Text_20_body">Este documento descreve cada etapa do projeto de <text:span text:style-name="T1">disciplina. O projeto se baseia na analise de </text:span>de artigos da BBC, <text:span text:style-name="T1">utilizando</text:span> técnicas de Processamento de Linguagem Natural (PLN) e aprendizado de máquina para categorizar notícias em cinco categorias: <text:span text:style-name="T2">business, entertainment, politics, sport, tech</text:span>.</text:p>
      <text:p text:style-name="P1">Link do projeto no github: <text:a xlink:type="simple" xlink:href="https://github.com/LMRocha/NLP_BBC-News-Classification" text:style-name="Internet_20_link" text:visited-style-name="Visited_20_Internet_20_Link">https://github.com/LMRocha/NLP_BBC-News-Classification</text:a></text:p>
      <text:p text:style-name="P2"/>
      <text:h text:style-name="Heading_20_3" text:outline-level="3">1. Visão Geral</text:h>
      <text:list text:style-name="L1">
        <text:list-item>
          <text:p text:style-name="P3"><text:span text:style-name="T2">Objetivo</text:span>: <text:span text:style-name="T1">C</text:span>lassificar artigos da BBC e realizar buscas por similaridade.</text:p>
        </text:list-item>
        <text:list-item>
          <text:p text:style-name="P3"><text:span text:style-name="T2">Dataset</text:span>: 2225 artigos da BBC, cada um com <text:span text:style-name="T1">o </text:span><text:span text:style-name="T3">respectivo</text:span><text:span text:style-name="T1"> </text:span><text:span text:style-name="T3">corpus </text:span><text:span text:style-name="T1">e categoria</text:span>.</text:p>
        </text:list-item>
        <text:list-item>
          <text:p text:style-name="P3"><text:span text:style-name="T2">Abordagem</text:span>: Pré-processamento textual, vetorização (TF‑IDF, BoW, n-grams, Word2Vec), busca por similaridade de cosseno e treino de classificadores (SVM, Regressão Logística, Random Forest).</text:p>
        </text:list-item>
      </text:list>
      <text:p text:style-name="Horizontal_20_Line"/>
      <text:h text:style-name="Heading_20_3" text:outline-level="3">2. Importação de Bibliotecas</text:h>
      <text:p text:style-name="Text_20_body">As bibliotecas são carregadas para:</text:p>
      <text:list text:style-name="L2">
        <text:list-item>
          <text:p text:style-name="P4"><text:span text:style-name="T4">Manipulação de dados:</text:span> <text:span text:style-name="T5">pandas</text:span>, <text:span text:style-name="T5">numpy</text:span></text:p>
        </text:list-item>
        <text:list-item>
          <text:p text:style-name="P4"><text:span text:style-name="T4">Visualização:</text:span> <text:span text:style-name="T5">matplotlib</text:span>, <text:span text:style-name="T5">seaborn</text:span>, <text:span text:style-name="T5">wordcloud</text:span></text:p>
        </text:list-item>
        <text:list-item>
          <text:p text:style-name="P4"><text:span text:style-name="T4">Processamento de texto:</text:span> <text:span text:style-name="T5">re</text:span>, <text:span text:style-name="T5">nltk</text:span>, <text:span text:style-name="T5">spacy</text:span></text:p>
        </text:list-item>
        <text:list-item>
          <text:p text:style-name="P4"><text:span text:style-name="T4">Vetorização:</text:span> <text:span text:style-name="T5">sklearn.feature_extraction.text</text:span>, <text:span text:style-name="T5">gensim</text:span></text:p>
        </text:list-item>
        <text:list-item>
          <text:p text:style-name="P4"><text:span text:style-name="T4">Modelos e métricas:</text:span> <text:span text:style-name="T5">sklearn.svm</text:span>, <text:span text:style-name="T5">sklearn.linear_model</text:span>, <text:span text:style-name="T5">sklearn.ensemble</text:span>, <text:span text:style-name="T5">sklearn.metrics</text:span></text:p>
        </text:list-item>
        <text:list-item>
          <text:p text:style-name="P4"><text:span text:style-name="T4">Download do dataset:</text:span> <text:span text:style-name="T5">kaggle.api</text:span></text:p>
        </text:list-item>
      </text:list>
      <text:p text:style-name="Text_20_body">As stopwords em inglês e o lematizador do NLTK são baixados (<text:span text:style-name="T5">nltk.download</text:span>).</text:p>
      <text:p text:style-name="Horizontal_20_Line"/>
      <text:h text:style-name="Heading_20_3" text:outline-level="3">3. Download e Preparação dos Dados</text:h>
      <text:p text:style-name="Text_20_body">O dataset é obtido via <text:span text:style-name="T2">Kaggle API</text:span> a partir do repositório <text:span text:style-name="T5">hgultekin/bbcnewsarchive</text:span>. Os arquivos são descompactados no diretório <text:span text:style-name="T5">data/</text:span>. Em seguida, o arquivo <text:span text:style-name="T5">bbc-news-data.csv</text:span> é lido com <text:span text:style-name="T5">pandas</text:span>.</text:p>
      <text:p text:style-name="Horizontal_20_Line"/>
      <text:h text:style-name="Heading_20_3" text:outline-level="3">4. Funções de Preparação de Texto</text:h>
      <text:p text:style-name="Text_20_body"><text:span text:style-name="T1">Foram definidas funções para cada etapa, conforme a tabulação apresentada abaixo</text:span>:</text:p>
      <table:table table:name="Tabela1" table:style-name="Tabela1">
        <table:table-column table:style-name="Tabela1.A"/>
        <table:table-column table:style-name="Tabela1.B"/>
        <table:table-header-rows>
          <text:soft-page-break/>
          <table:table-row>
            <table:table-cell table:style-name="Tabela1.A1" office:value-type="string">
              <text:p text:style-name="P5">Função</text:p>
            </table:table-cell>
            <table:table-cell table:style-name="Tabela1.B1" office:value-type="string">
              <text:p text:style-name="P5">Descrição</text:p>
            </table:table-cell>
          </table:table-row>
        </table:table-header-rows>
        <table:table-row>
          <table:table-cell table:style-name="Tabela1.A2" office:value-type="string">
            <text:p text:style-name="P6">tokenize(text)</text:p>
          </table:table-cell>
          <table:table-cell table:style-name="Tabela1.B2" office:value-type="string">
            <text:p text:style-name="P7">Divide o texto em palavras (split por espaços).</text:p>
          </table:table-cell>
        </table:table-row>
        <table:table-row>
          <table:table-cell table:style-name="Tabela1.A2" office:value-type="string">
            <text:p text:style-name="P6">normalize(text)</text:p>
          </table:table-cell>
          <table:table-cell table:style-name="Tabela1.B2" office:value-type="string">
            <text:p text:style-name="P7">Converte todo o texto para minúsculas.</text:p>
          </table:table-cell>
        </table:table-row>
        <table:table-row>
          <table:table-cell table:style-name="Tabela1.A2" office:value-type="string">
            <text:p text:style-name="P6">clean_text(text)</text:p>
          </table:table-cell>
          <table:table-cell table:style-name="Tabela1.B2" office:value-type="string">
            <text:p text:style-name="P7">Remove caracteres não alfabéticos (exceto espaços).</text:p>
          </table:table-cell>
        </table:table-row>
        <table:table-row>
          <table:table-cell table:style-name="Tabela1.A2" office:value-type="string">
            <text:p text:style-name="P6">lemmatize(tokens)</text:p>
          </table:table-cell>
          <table:table-cell table:style-name="Tabela1.B2" office:value-type="string">
            <text:p text:style-name="Table_20_Contents">Aplica lematização usando <text:span text:style-name="T5">WordNetLemmatizer</text:span>.</text:p>
          </table:table-cell>
        </table:table-row>
        <table:table-row>
          <table:table-cell table:style-name="Tabela1.A2" office:value-type="string">
            <text:p text:style-name="P6">stemmize(tokens)</text:p>
          </table:table-cell>
          <table:table-cell table:style-name="Tabela1.B2" office:value-type="string">
            <text:p text:style-name="Table_20_Contents">Aplica stemming com <text:span text:style-name="T5">PorterStemmer</text:span>.</text:p>
          </table:table-cell>
        </table:table-row>
        <table:table-row>
          <table:table-cell table:style-name="Tabela1.A2" office:value-type="string">
            <text:p text:style-name="P6">apply_pos_tagging(text)</text:p>
          </table:table-cell>
          <table:table-cell table:style-name="Tabela1.B2" office:value-type="string">
            <text:p text:style-name="P7">Usa spaCy para manter apenas substantivos, verbos e adjetivos (lematizados), removendo stopwords.</text:p>
          </table:table-cell>
        </table:table-row>
        <table:table-row>
          <table:table-cell table:style-name="Tabela1.A2" office:value-type="string">
            <text:p text:style-name="P6">preprocess_text(...)</text:p>
          </table:table-cell>
          <table:table-cell table:style-name="Tabela1.B2" office:value-type="string">
            <text:p text:style-name="P7">Função unificada que aplica normalização, limpeza, remoção de stopwords e opcionalmente lematização, stemização ou POS tagging.</text:p>
          </table:table-cell>
        </table:table-row>
        <table:table-row>
          <table:table-cell table:style-name="Tabela1.A2" office:value-type="string">
            <text:p text:style-name="P6">plot_word_cloud(...)</text:p>
          </table:table-cell>
          <table:table-cell table:style-name="Tabela1.B2" office:value-type="string">
            <text:p text:style-name="P7">Gera nuvem de palavras a partir dos textos processados.</text:p>
          </table:table-cell>
        </table:table-row>
        <table:table-row>
          <table:table-cell table:style-name="Tabela1.A2" office:value-type="string">
            <text:p text:style-name="P6">plot_bar_frequencia(...)</text:p>
          </table:table-cell>
          <table:table-cell table:style-name="Tabela1.B2" office:value-type="string">
            <text:p text:style-name="P7">Plota as 10 palavras mais frequentes em um gráfico de barras.</text:p>
          </table:table-cell>
        </table:table-row>
      </table:table>
      <text:p text:style-name="Text_20_body"/>
      <text:p text:style-name="Text_20_body">Após definir essas funções, os textos são pré-processados com lematização e stemização separadamente, gerando duas listas: <text:span text:style-name="T5">processed_text_lemmatize</text:span> e <text:span text:style-name="T5">processed_text_stemmize</text:span>. O resultado é armazenado em <text:span text:style-name="T5">df_clean</text:span>.</text:p>
      <text:p text:style-name="Horizontal_20_Line"/>
      <text:h text:style-name="Heading_20_3" text:outline-level="3">5. Funções de Vetorização</text:h>
      <text:p text:style-name="Text_20_body">Quatro formas de representação vetorial são implementadas:</text:p>
      <table:table table:name="Tabela2" table:style-name="Tabela2">
        <table:table-column table:style-name="Tabela2.A" table:number-columns-repeated="3"/>
        <table:table-header-rows>
          <table:table-row>
            <table:table-cell table:style-name="Tabela2.A1" office:value-type="string">
              <text:p text:style-name="P5">Função</text:p>
            </table:table-cell>
            <table:table-cell table:style-name="Tabela2.A1" office:value-type="string">
              <text:p text:style-name="P5">Método</text:p>
            </table:table-cell>
            <table:table-cell table:style-name="Tabela2.C1" office:value-type="string">
              <text:p text:style-name="P5">Parâmetros</text:p>
            </table:table-cell>
          </table:table-row>
        </table:table-header-rows>
        <table:table-row>
          <table:table-cell table:style-name="Tabela2.A2" office:value-type="string">
            <text:p text:style-name="P6">vetorizer_tfidf(docs)</text:p>
          </table:table-cell>
          <table:table-cell table:style-name="Tabela2.A2" office:value-type="string">
            <text:p text:style-name="P7">TF‑IDF</text:p>
          </table:table-cell>
          <table:table-cell table:style-name="Tabela2.C2" office:value-type="string">
            <text:p text:style-name="P6">TfidfVectorizer()</text:p>
          </table:table-cell>
        </table:table-row>
        <table:table-row>
          <table:table-cell table:style-name="Tabela2.A2" office:value-type="string">
            <text:p text:style-name="P6">vetorizer_bow(docs)</text:p>
          </table:table-cell>
          <table:table-cell table:style-name="Tabela2.A2" office:value-type="string">
            <text:p text:style-name="P7">Bag of Words</text:p>
          </table:table-cell>
          <table:table-cell table:style-name="Tabela2.C2" office:value-type="string">
            <text:p text:style-name="P6">CountVectorizer()</text:p>
          </table:table-cell>
        </table:table-row>
        <table:table-row>
          <table:table-cell table:style-name="Tabela2.A2" office:value-type="string">
            <text:p text:style-name="P6">vetorizer_bow_ngrams(docs, range1, range2)</text:p>
          </table:table-cell>
          <table:table-cell table:style-name="Tabela2.A2" office:value-type="string">
            <text:p text:style-name="P7">BoW com n-grams</text:p>
          </table:table-cell>
          <table:table-cell table:style-name="Tabela2.C2" office:value-type="string">
            <text:p text:style-name="P6">ngram_range=(2,2)</text:p>
          </table:table-cell>
        </table:table-row>
        <table:table-row>
          <table:table-cell table:style-name="Tabela2.A2" office:value-type="string">
            <text:p text:style-name="P6">vetorizer_word2vec(sentences, vector_size=5, window=2, min_count=1)</text:p>
          </table:table-cell>
          <table:table-cell table:style-name="Tabela2.A2" office:value-type="string">
            <text:p text:style-name="P7">Word2Vec</text:p>
          </table:table-cell>
          <table:table-cell table:style-name="Tabela2.C2" office:value-type="string">
            <text:p text:style-name="P7">Vetores de tamanho 5, janela 2, frequência mínima 1. O vetor de cada documento é a média dos vetores das palavras que estão no vocabulário.</text:p>
          </table:table-cell>
        </table:table-row>
      </table:table>
      <text:p text:style-name="Text_20_body"/>
      <text:p text:style-name="Text_20_body">Após a definição, os vetores são calculados para os textos lematizados e armazenados em um dicionário <text:span text:style-name="T5">X</text:span>.</text:p>
      <text:p text:style-name="Horizontal_20_Line"/>
      <text:h text:style-name="Heading_20_3" text:outline-level="3"><text:soft-page-break/>6. Funções de Busca por Similaridade</text:h>
      <text:p text:style-name="Text_20_body">Duas funções principais realizam consultas:</text:p>
      <text:list text:style-name="L3">
        <text:list-item>
          <text:p text:style-name="P8"><text:span text:style-name="T6">buscar(query, vectorizer, X_matrix, y_labels, original_texts, top_k=5)</text:span><text:line-break/>Aplica o mesmo pré-processamento à consulta, transforma‑a com o <text:span text:style-name="T5">vectorizer</text:span> (TF‑IDF, BoW ou n‑grams) e calcula a similaridade de cosseno entre o vetor da consulta e cada documento. Retorna os <text:span text:style-name="T5">top_k</text:span> documentos mais similares, suas categorias e trechos.</text:p>
        </text:list-item>
        <text:list-item>
          <text:p text:style-name="P8"><text:span text:style-name="T6">buscar_w2v(query, w2v_model, doc_vectors, y_labels, original_texts, top_k=5)</text:span><text:line-break/>Similar, mas para Word2Vec: calcula o vetor da consulta como a média dos vetores das palavras e usa similaridade de cosseno nos vetores dos documentos.</text:p>
        </text:list-item>
      </text:list>
      <text:p text:style-name="Text_20_body">Além disso, funções auxiliares:</text:p>
      <text:list text:style-name="L4">
        <text:list-item>
          <text:p text:style-name="P9"><text:span text:style-name="T5">plot_category_distribution(...)</text:span>: gráfico de pizza com a distribuição das categorias nos resultados.</text:p>
        </text:list-item>
        <text:list-item>
          <text:p text:style-name="P9"><text:span text:style-name="T5">plot_pca_projection(...)</text:span>: projeção PCA dos vetores dos documentos e da consulta, destacando os <text:span text:style-name="T5">top_k</text:span> resultados.</text:p>
        </text:list-item>
      </text:list>
      <text:p text:style-name="Text_20_body"><text:span text:style-name="T2">Exemplos de busca</text:span> executados no notebook:</text:p>
      <text:list text:style-name="L5">
        <text:list-item>
          <text:p text:style-name="P10"><text:span text:style-name="T5">"stock market crash"</text:span> com TF‑IDF</text:p>
        </text:list-item>
        <text:list-item>
          <text:p text:style-name="P10"><text:span text:style-name="T5">"movie award"</text:span> com BoW e com n‑grams</text:p>
        </text:list-item>
        <text:list-item>
          <text:p text:style-name="P10"><text:span text:style-name="T5">"computer"</text:span> com Word2Vec (similaridades zero devido à pequena dimensão dos vetores e vocabulário limitado)</text:p>
        </text:list-item>
      </text:list>
      <text:p text:style-name="Horizontal_20_Line"/>
      <text:h text:style-name="Heading_20_3" text:outline-level="3">7. Funções de Análise Exploratória (EDA)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5">Função</text:p>
            </table:table-cell>
            <table:table-cell table:style-name="Tabela3.B1" office:value-type="string">
              <text:p text:style-name="P5">Descrição</text:p>
            </table:table-cell>
          </table:table-row>
        </table:table-header-rows>
        <table:table-row>
          <table:table-cell table:style-name="Tabela3.A2" office:value-type="string">
            <text:p text:style-name="P6">count_tokens(text)</text:p>
          </table:table-cell>
          <table:table-cell table:style-name="Tabela3.B2" office:value-type="string">
            <text:p text:style-name="P7">Retorna o número de palavras no texto.</text:p>
          </table:table-cell>
        </table:table-row>
        <table:table-row>
          <table:table-cell table:style-name="Tabela3.A2" office:value-type="string">
            <text:p text:style-name="P6">get_top_words(category, df_clean, n=10)</text:p>
          </table:table-cell>
          <table:table-cell table:style-name="Tabela3.B2" office:value-type="string">
            <text:p text:style-name="Table_20_Contents">Retorna as <text:span text:style-name="T1">10 </text:span>palavras mais frequentes em uma categoria.</text:p>
          </table:table-cell>
        </table:table-row>
        <table:table-row>
          <table:table-cell table:style-name="Tabela3.A2" office:value-type="string">
            <text:p text:style-name="P6">plot_analise_robustes(df_clean)</text:p>
          </table:table-cell>
          <table:table-cell table:style-name="Tabela3.B2" office:value-type="string">
            <text:p text:style-name="P7">Gera histograma da distribuição do número de palavras por documento e boxplot por categoria; também plota a contagem de documentos por categoria (desbalanceamento).</text:p>
          </table:table-cell>
        </table:table-row>
        <table:table-row>
          <table:table-cell table:style-name="Tabela3.A2" office:value-type="string">
            <text:p text:style-name="P6">plot_analise_top_word(df_clean)</text:p>
          </table:table-cell>
          <table:table-cell table:style-name="Tabela3.B2" office:value-type="string">
            <text:p text:style-name="P7">Exibe as 10 palavras mais frequentes por categoria e nuvens de palavras separadas por categoria.</text:p>
          </table:table-cell>
        </table:table-row>
        <table:table-row>
          <table:table-cell table:style-name="Tabela3.A2" office:value-type="string">
            <text:p text:style-name="P6">plot_word_cooccurrence_graph(...)</text:p>
          </table:table-cell>
          <table:table-cell table:style-name="Tabela3.B2" office:value-type="string">
            <text:p text:style-name="P7">Constrói um grafo de coocorrência (nós = palavras, arestas = pares que coocorrem no mesmo documento). Permite filtrar por categoria.</text:p>
          </table:table-cell>
        </table:table-row>
      </table:table>
      <text:p text:style-name="Text_20_body"/>
      <text:p text:style-name="Text_20_body"><text:soft-page-break/>Essas funções são executadas para entender a distribuição dos dados, as palavras‑chave de cada tópico e as relações semânticas entre termos.</text:p>
      <text:p text:style-name="Horizontal_20_Line"/>
      <text:h text:style-name="Heading_20_3" text:outline-level="3">8. Funções de Treino e Validação</text:h>
      <text:list text:style-name="L6">
        <text:list-item>
          <text:p text:style-name="P11"><text:span text:style-name="T6">treino_e_validacao(models, X_train, y_train, X_test=None, y_test=None, cv=None)</text:span><text:line-break/>Treina uma lista de modelos (ex.: <text:span text:style-name="T5">[('SVM', SVC()), ...]</text:span>). Se <text:span text:style-name="T5">X_test</text:span> e <text:span text:style-name="T5">y_test</text:span> são fornecidos, avalia acurácia, relatório de classificação e matriz de confusão. Retorna um dicionário com os resultados.</text:p>
        </text:list-item>
        <text:list-item>
          <text:p text:style-name="P11"><text:span text:style-name="T6">plot_validacao_modelos(metrics_df, plot_accuracy=True, plot_time=True, figsize=(10,5))</text:span><text:line-break/>Recebe um DataFrame com colunas "Modelo", "Acurácia", "Tempo (s)" e plota gráficos de barras comparativos.</text:p>
        </text:list-item>
      </text:list>
      <text:p text:style-name="Horizontal_20_Line"/>
      <text:h text:style-name="Heading_20_3" text:outline-level="3">9. Pipeline de Execução</text:h>
      <text:p text:style-name="Text_20_body">O notebook executa as seguintes etapas (células finais):</text:p>
      <text:list text:style-name="L7">
        <text:list-item>
          <text:p text:style-name="P12"><text:span text:style-name="T2">Preparação textual</text:span> – Geração dos textos lematizados e stemizados.</text:p>
        </text:list-item>
        <text:list-item>
          <text:p text:style-name="P12"><text:span text:style-name="T2">Visualização inicial</text:span> – Nuvem de palavras e gráfico de frequência dos textos lematizados.</text:p>
        </text:list-item>
        <text:list-item>
          <text:p text:style-name="P12"><text:span text:style-name="T2">Vetorização</text:span> – Criação dos vetores TF‑IDF, BoW, n‑grams e Word2Vec.</text:p>
        </text:list-item>
        <text:list-item>
          <text:p text:style-name="P12"><text:span text:style-name="T2">Busca por similaridade</text:span> – Demonstração com consultas e projeção PCA.</text:p>
        </text:list-item>
        <text:list-item>
          <text:p text:style-name="P12"><text:span text:style-name="T2">Análise EDA</text:span> – Execução das funções de análise (tamanho dos documentos, palavras‑chave, coocorrência).</text:p>
        </text:list-item>
        <text:list-item>
          <text:p text:style-name="P12"><text:span text:style-name="T2">Treino e validação</text:span> – (Nota: no notebook fornecido os modelos não são treinados explicitamente, mas as funções estão definidas; a seção final indica que seriam utilizadas.)</text:p>
        </text:list-item>
      </text:list>
      <text:p text:style-name="Horizontal_20_Line"/>
      <text:h text:style-name="Heading_20_3" text:outline-level="3">Observações Importantes</text:h>
      <text:list text:style-name="L8">
        <text:list-item>
          <text:p text:style-name="P13"><text:span text:style-name="T2">Pré‑processamento</text:span>: Foram aplicadas lematização e stemização separadamente. A lematização foi a mais utilizada nas etapas posteriores.</text:p>
        </text:list-item>
        <text:list-item>
          <text:p text:style-name="P13"><text:span text:style-name="T2">Word2Vec</text:span>: Com <text:span text:style-name="T5">vector_size=5</text:span> e <text:span text:style-name="T5">min_count=1</text:span>, os vetores são de baixa dimensão e qualquer palavra é considerada. Isso pode explicar as similaridades nulas na busca <text:span text:style-name="T5">"computer"</text:span>.</text:p>
        </text:list-item>
        <text:list-item>
          <text:p text:style-name="P13"><text:span text:style-name="T2">Desbalanceamento</text:span>: A categoria <text:span text:style-name="T5">sport</text:span> possui 511 artigos, enquanto <text:span text:style-name="T5">entertainment</text:span> tem 386 – isso pode afetar a performance dos classificadores.</text:p>
        </text:list-item>
        <text:list-item>
          <text:p text:style-name="P13"><text:span text:style-name="T2">Palavras‑chave</text:span>: Por categoria, as palavras mais frequentes refletem os tópicos (ex.: <text:span text:style-name="T5">said</text:span>, <text:span text:style-name="T5">mr</text:span> em business; <text:span text:style-name="T5">film</text:span>, <text:span text:style-name="T5">award</text:span> em entertainment; <text:span text:style-name="T5">game</text:span>, <text:span text:style-name="T5">player</text:span> em sport; <text:span text:style-name="T5">technology</text:span>, <text:span text:style-name="T5">mobile</text:span> em tech).</text:p>
        </text:list-item>
        <text:list-item>
          <text:p text:style-name="P13"><text:soft-page-break/><text:span text:style-name="T2">Grafo de coocorrência</text:span>: Útil para visualizar associações semânticas; o notebook gera gráficos para todos os documentos e para categorias específicas.</text:p>
        </text:list-item>
      </text:list>
      <text:p text:style-name="Horizontal_20_Line"/>
      <text:h text:style-name="P14" text:outline-level="3">Análise da execução das etapas</text:h>
      <text:p text:style-name="P15">Etapa 1 – Preparação textual</text:p>
      <text:p text:style-name="P16">Foi realizado todo o processo de normalização, tokenização e purificação dos documentos <text:span text:style-name="T7">(remoção de dados numéricos, stopwords e acentuações).</text:span><text:span text:style-name="T8"/></text:p>
      <text:p text:style-name="P17"><text:span text:style-name="T9">Posteriormente foi aplicado as estratégias de </text:span><text:span text:style-name="T10">lemmatizing, stemmizing e POS.</text:span><text:span text:style-name="T9">A estratégia selecionada foi </text:span><text:span text:style-name="T10">lemmatizing</text:span><text:span text:style-name="T9"> pois a técnica de stemmizing “cortava” em excedente o contexto das palavras podendo gerar falhas na interpretação nos treinamentos do modelo. Não houve a aplicação do </text:span><text:span text:style-name="T10">POS</text:span><text:span text:style-name="T9"> devido a lentidão de sua aplicação ao dataset </text:span><text:span text:style-name="T10">(aguardo de aproximadamente 15 minutos sem finalização)</text:span><text:span text:style-name="T9">.</text:span></text:p>
      <text:p text:style-name="P18">Etapa <text:span text:style-name="T11">2</text:span> – <text:span text:style-name="T12">Vetorização</text:span></text:p>
      <text:p text:style-name="P19">Busca por similaridade</text:p>
      <text:p text:style-name="P20">Foram utilizados as técnicas de <text:span text:style-name="T7">TF-IDF, BoW, Bow N-gram e Word2Vec </text:span><text:span text:style-name="T13">para a transformação dos documentos em vetores</text:span>. Foi gerado um dicionário para armazenar os vetorizados, processados com <text:span text:style-name="T7">lemmatizing</text:span> cada qual com a sua estratégia.</text:p>
      <text:p text:style-name="P20">Para cada modelo de vetorização foi realizada um a implementação uma busca por similaridade.</text:p>
      <text:p text:style-name="P21">Analisando os resultados foi verificado que a busca com os melhores índices foi de longe o <text:span text:style-name="T7">Word2Vec</text:span><text:span text:style-name="T8">.</text:span></text:p>
      <text:p text:style-name="P22">Análise EDA textual</text:p>
      <text:list text:style-name="L9">
        <text:list-item>
          <text:p text:style-name="P23">Realizada a contagem de tokens por categoria.</text:p>
        </text:list-item>
        <text:list-item>
          <text:p text:style-name="P23">Listagem das palavras mais frequentes</text:p>
        </text:list-item>
        <text:list-item>
          <text:p text:style-name="P23">Visualização do balanceamento por categorias do dataset</text:p>
          <text:list>
            <text:list-item>
              <text:p text:style-name="P23">Dataset minimamente desbalanceado, não o suficiente para impactar nos resultados finais.</text:p>
            </text:list-item>
          </text:list>
        </text:list-item>
        <text:list-item>
          <text:p text:style-name="P23">Realizada a análise de grafo de coocorrencia com 25 nós, utilizando a categoria “tech”. </text:p>
          <text:list>
            <text:list-item>
              <text:p text:style-name="P23">Foi verificada uma densidade de 1000 o que indica uma grafo denso na proximidade de suas palavras.</text:p>
            </text:list-item>
            <text:list-item>
              <text:p text:style-name="P23">Arestas grossas representam forte <text:span text:style-name="T14">associação</text:span> entre palavras, por exemplo <text:span text:style-name="T7">mobile-phone.</text:span></text:p>
            </text:list-item>
          </text:list>
        </text:list-item>
      </text:list>
      <text:p text:style-name="P24"/>
      <text:p text:style-name="P24">Etapa <text:span text:style-name="T15">3</text:span> – <text:span text:style-name="T15">Treinamento </text:span><text:span text:style-name="T16">e métricas</text:span></text:p>
      <text:p text:style-name="P25">O treinamento e o teste foram realizados através do aprendizado supervisionado, utilizando os modelos de classificação <text:span text:style-name="T7">SVM, Logistic Regression e Random Forest. </text:span>De forma a realizar uma análise comparativa entre os diferentes tipos de vetorização e a sua eficiência frente aos modelos utilizados, foi iterado para cada conjunto de textos processados o treinamento para os três modelos.</text:p>
      <text:p text:style-name="P25"><text:soft-page-break/>Analisando o resultado final podemos concluir que ambas as métricas foram muito boas, sendo a única técnica de vetorização com as menores métricas a <text:span text:style-name="T7">Word2Vec.</text:span></text:p>
      <text:p text:style-name="P25">Foi analisado também o tempo de treinamento do modelo mediante a técnica de vetorização utilizada, e concluímos que a melhor abordagem é BoW-Ngra → Logistic Regression, que apresentou o menor tempo de treinamento e o maior percentual de métricas.</text:p>
      <text:p text:style-name="P26">Referente as métricas abaixo do geral do <text:span text:style-name="T7">Word2Vec</text:span>, a principal argumentação está em sua performance reduzida para lidar com algoritmos de classificação, devido a densidade de seus vetores para as palavras. Entra em pauta, também, que apesar de mais de 2 mil documentos, ainda é uma quantidade relativamente pequena para o uso performatico do <text:span text:style-name="T7">Word2Vec.</text:span></text:p>
      <text:h text:style-name="Heading_20_3" text:outline-level="3">Conclusão</text:h>
      <text:p text:style-name="Text_20_body">Este notebook fornece uma base sólida para classificação de textos em inglês, cobrindo desde o pré‑processamento até a avaliação de modelos. As funções são modulares e podem ser reutilizadas em outros projetos de PLN. A análise exploratória permite compreender a natureza dos dados, e os mecanismos de busca demonstram a utilidade da representação vetorial para recuperação de informaçã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11:40:18.591319500</meta:creation-date>
    <dc:date>2026-05-29T17:30:24.658349300</dc:date>
    <meta:editing-duration>PT1H49M8S</meta:editing-duration>
    <meta:editing-cycles>17</meta:editing-cycles>
    <meta:generator>LibreOffice/26.2.1.2$Windows_X86_64 LibreOffice_project/620$Build-2</meta:generator>
    <meta:print-date>2026-05-29T17:31:35.709325300</meta:print-date>
    <meta:printed-by>Arquivos PDF</meta:printed-by>
    <meta:document-statistic meta:table-count="3" meta:image-count="0" meta:object-count="0" meta:page-count="6" meta:paragraph-count="125" meta:word-count="1407" meta:character-count="10095" meta:non-whitespace-character-count="8838"/>
  </office:meta>
</office:document-meta>
</file>